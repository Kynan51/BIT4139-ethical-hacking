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onospace" svg:font-family="monospace" style:font-family-generic="roman" svg:panose-1="0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1666in" fo:margin-bottom="0.1666in" fo:margin-left="0.5in">
        <style:tab-stops/>
      </style:paragraph-properties>
    </style:style>
    <style:style style:name="P2" style:parent-style-name="Normal" style:family="paragraph">
      <style:paragraph-properties fo:text-align="center" fo:margin-top="0.1666in" fo:margin-bottom="0.1666in" fo:margin-left="0.5in">
        <style:tab-stops/>
      </style:paragraph-properties>
    </style:style>
    <style:style style:name="T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" style:parent-style-name="Normal" style:family="paragraph">
      <style:paragraph-properties fo:text-align="center" fo:margin-top="0.1666in" fo:margin-bottom="0.1666in" fo:margin-left="0.5in">
        <style:tab-stops/>
      </style:paragraph-properties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7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" style:parent-style-name="Normal" style:family="paragraph">
      <style:paragraph-properties fo:text-align="center" fo:margin-top="0.1666in" fo:margin-bottom="0.1666in" fo:margin-left="0.5in">
        <style:tab-stops/>
      </style:paragraph-properties>
    </style:style>
    <style:style style:name="T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0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" style:parent-style-name="Normal" style:family="paragraph">
      <style:paragraph-properties fo:text-align="center" fo:margin-top="0.1666in" fo:margin-bottom="0.1666in" fo:margin-left="0.5in">
        <style:tab-stops/>
      </style:paragraph-properties>
    </style:style>
    <style:style style:name="T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3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4" style:parent-style-name="Normal" style:family="paragraph">
      <style:paragraph-properties fo:text-align="center" fo:margin-top="0.1666in" fo:margin-bottom="0.1666in" fo:margin-left="0.5in">
        <style:tab-stops/>
      </style:paragraph-properties>
    </style:style>
    <style:style style:name="T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6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" style:parent-style-name="Normal" style:family="paragraph">
      <style:paragraph-properties fo:text-align="center" fo:margin-top="0.1666in" fo:margin-bottom="0.1666in" fo:margin-left="0.5in">
        <style:tab-stops/>
      </style:paragraph-properties>
    </style:style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9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0" style:parent-style-name="Normal" style:family="paragraph">
      <style:paragraph-properties fo:text-align="center" fo:margin-top="0.1666in" fo:margin-bottom="0.1666in" fo:margin-left="0.5in">
        <style:tab-stops/>
      </style:paragraph-properties>
    </style:style>
    <style:style style:name="T2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2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3" style:parent-style-name="Normal" style:family="paragraph">
      <style:text-properties style:font-name="Times New Roman" style:font-name-asian="Times New Roman" style:font-name-complex="Times New Roman" fo:color="#000000"/>
    </style:style>
    <style:style style:name="P24" style:parent-style-name="Normal" style:family="paragraph">
      <style:paragraph-properties fo:line-height="100%"/>
    </style:style>
    <style:style style:name="T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/>
    </style:style>
    <style:style style:name="P26" style:parent-style-name="ListParagraph" style:family="paragraph">
      <style:paragraph-properties fo:line-height="100%"/>
      <style:text-properties style:font-name="Times New Roman" style:font-name-asian="Times New Roman" style:font-name-complex="Times New Roman" fo:color="#000000"/>
    </style:style>
    <style:style style:name="P27" style:parent-style-name="ListParagraph" style:family="paragraph">
      <style:paragraph-properties fo:line-height="100%"/>
      <style:text-properties style:font-name="Times New Roman" style:font-name-asian="Times New Roman" style:font-name-complex="Times New Roman" fo:color="#000000"/>
    </style:style>
    <style:style style:name="P28" style:parent-style-name="ListParagraph" style:family="paragraph">
      <style:paragraph-properties fo:line-height="100%"/>
      <style:text-properties style:font-name="Times New Roman" style:font-name-asian="Times New Roman" style:font-name-complex="Times New Roman" fo:color="#000000"/>
    </style:style>
    <style:style style:name="P29" style:parent-style-name="ListParagraph" style:family="paragraph">
      <style:paragraph-properties fo:line-height="100%"/>
      <style:text-properties style:font-name="Times New Roman" style:font-name-asian="Times New Roman" style:font-name-complex="Times New Roman" fo:color="#000000"/>
    </style:style>
    <style:style style:name="P30" style:parent-style-name="Normal" style:family="paragraph">
      <style:paragraph-properties fo:line-height="100%"/>
      <style:text-properties style:font-name="Times New Roman" style:font-name-asian="Times New Roman" style:font-name-complex="Times New Roman" fo:color="#000000"/>
    </style:style>
    <style:style style:name="P31" style:parent-style-name="Normal" style:family="paragraph">
      <style:paragraph-properties fo:break-before="page"/>
    </style:style>
    <style:style style:name="P32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33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4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5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7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8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9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40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41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42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43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44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45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46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47" style:parent-style-name="Normal" style:family="paragraph">
      <style:paragraph-properties fo:break-before="page"/>
    </style:style>
    <style:style style:name="P48" style:parent-style-name="Heading2" style:family="paragraph">
      <style:paragraph-properties fo:break-before="page"/>
    </style:style>
    <style:style style:name="TableColumn50" style:family="table-column">
      <style:table-column-properties style:column-width="1.4555in"/>
    </style:style>
    <style:style style:name="TableColumn51" style:family="table-column">
      <style:table-column-properties style:column-width="2.2701in"/>
    </style:style>
    <style:style style:name="TableColumn52" style:family="table-column">
      <style:table-column-properties style:column-width="2.7673in"/>
    </style:style>
    <style:style style:name="Table49" style:family="table">
      <style:table-properties style:width="6.493in" fo:margin-left="0in" table:align="left"/>
    </style:style>
    <style:style style:name="TableRow53" style:family="table-row">
      <style:table-row-properties style:min-row-height="0.2083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0" style:family="table-row">
      <style:table-row-properties style:min-row-height="0.2083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Row67" style:family="table-row">
      <style:table-row-properties style:min-row-height="0.2083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 style:min-row-height="0.2083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Row81" style:family="table-row">
      <style:table-row-properties style:min-row-height="0.2083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Row88" style:family="table-row">
      <style:table-row-properties style:min-row-height="0.2083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95" style:parent-style-name="DefaultParagraphFont" style:family="text">
      <style:text-properties fo:font-size="11pt" style:font-size-asian="11pt" style:font-size-complex="11pt"/>
    </style:style>
    <style:style style:name="TableRow96" style:family="table-row">
      <style:table-row-properties style:min-row-height="0.2083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TableRow104" style:family="table-row">
      <style:table-row-properties style:min-row-height="0.2083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111" style:parent-style-name="DefaultParagraphFont" style:family="text">
      <style:text-properties style:font-name="monospace" style:font-name-asian="monospace" style:font-name-complex="monospace" fo:color="#000000" fo:font-size="9pt" style:font-size-asian="9pt" style:font-size-complex="9pt" fo:background-color="#006400"/>
    </style:style>
    <style:style style:name="T112" style:parent-style-name="DefaultParagraphFont" style:family="text">
      <style:text-properties style:font-name="monospace" style:font-name-asian="monospace" style:font-name-complex="monospace" fo:color="#000000" fo:font-size="9pt" style:font-size-asian="9pt" style:font-size-complex="9pt" fo:background-color="#006400"/>
    </style:style>
    <style:style style:name="T113" style:parent-style-name="DefaultParagraphFont" style:family="text">
      <style:text-properties style:font-name="monospace" style:font-name-asian="monospace" style:font-name-complex="monospace" fo:color="#000000" fo:font-size="9pt" style:font-size-asian="9pt" style:font-size-complex="9pt" fo:background-color="#006400"/>
    </style:style>
    <style:style style:name="T114" style:parent-style-name="DefaultParagraphFont" style:family="text">
      <style:text-properties style:font-name="monospace" style:font-name-asian="monospace" style:font-name-complex="monospace" fo:color="#000000" fo:font-size="9pt" style:font-size-asian="9pt" style:font-size-complex="9pt" fo:background-color="#006400"/>
    </style:style>
    <style:style style:name="T115" style:parent-style-name="DefaultParagraphFont" style:family="text">
      <style:text-properties style:font-name="monospace" style:font-name-asian="monospace" style:font-name-complex="monospace" fo:color="#000000" fo:font-size="9pt" style:font-size-asian="9pt" style:font-size-complex="9pt" fo:background-color="#006400"/>
    </style:style>
    <style:style style:name="T11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drawing" text:anchor-type="as-char" svg:x="0in" svg:y="0in" svg:width="6.34296in" svg:height="1.45815in" style:rel-width="scale" style:rel-height="scale"><draw:image xlink:href="media/image1.png" xlink:type="simple" xlink:show="embed" xlink:actuate="onLoad"/><svg:title/><svg:desc/></draw:frame></text:p>
      <text:p text:style-name="P2"><text:span text:style-name="T3">Student Name:<text:s/></text:span><text:span text:style-name="T4">Kenan Kiplimo</text:span></text:p>
      <text:p text:style-name="P5"><text:span text:style-name="T6">Admission Number:</text:span><text:span text:style-name="T7"><text:s/>BSCCS/2025/67071</text:span></text:p>
      <text:p text:style-name="P8"><text:span text:style-name="T9">Course/Class:</text:span><text:span text:style-name="T10"><text:s/>Bachelor of Science in Computer science</text:span></text:p>
      <text:p text:style-name="P11"><text:span text:style-name="T12">Unit Code:</text:span><text:span text:style-name="T13"><text:s/>BIT4139</text:span></text:p>
      <text:p text:style-name="P14"><text:span text:style-name="T15">Unit Name:</text:span><text:span text:style-name="T16"><text:s/>Ethical Hacking and Counter Measures</text:span></text:p>
      <text:p text:style-name="P17"><text:span text:style-name="T18">Lecturer Name:</text:span><text:span text:style-name="T19"><text:s/>Mr. Michael Nyoro</text:span></text:p>
      <text:p text:style-name="P20"><text:span text:style-name="T21">Semester/Academic Year:</text:span><text:span text:style-name="T22"><text:s/>Year 3 Semester 2, May 2026</text:span></text:p>
      <text:p text:style-name="P23"/>
      <text:p text:style-name="P24"><text:span text:style-name="T25">Tools</text:span></text:p>
      <text:list text:style-name="LFO1" text:continue-numbering="true">
        <text:list-item>
          <text:p text:style-name="P26">Whois</text:p>
        </text:list-item>
        <text:list-item>
          <text:p text:style-name="P27">Ping</text:p>
        </text:list-item>
        <text:list-item>
          <text:p text:style-name="P28">theHarvester</text:p>
        </text:list-item>
        <text:list-item>
          <text:p text:style-name="P29">Nmap</text:p>
        </text:list-item>
      </text:list>
      <text:p text:style-name="P30"/>
      <text:p text:style-name="Normal"/>
      <text:p text:style-name="P31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2"><text:a xlink:href="#_Toc231556753" office:target-frame-name="_top" xlink:show="replace"><text:span text:style-name="Hyperlink">Week 1: Nmap Installation and Scanning</text:span><text:tab/>1</text:a></text:p>
          <text:p text:style-name="P33"><text:a xlink:href="#_Toc231556754" office:target-frame-name="_top" xlink:show="replace"><text:span text:style-name="Hyperlink">Fig 1: NMAP INSTALLATION</text:span><text:tab/>1</text:a></text:p>
          <text:p text:style-name="P34"><text:a xlink:href="#_Toc231556755" office:target-frame-name="_top" xlink:show="replace"><text:span text:style-name="Hyperlink">Fig 2: CONFIRMING INSTALLATION</text:span><text:tab/>1</text:a></text:p>
          <text:p text:style-name="P35"><text:a xlink:href="#_Toc231556756" office:target-frame-name="_top" xlink:show="replace"><text:span text:style-name="Hyperlink">Fig 3: Scanning scanme.nmap.org</text:span><text:tab/>1</text:a></text:p>
          <text:p text:style-name="P36"><text:a xlink:href="#_Toc231556757" office:target-frame-name="_top" xlink:show="replace"><text:span text:style-name="Hyperlink">Fig 4: Scanning an ip address</text:span><text:tab/>1</text:a></text:p>
          <text:p text:style-name="P37"><text:a xlink:href="#_Toc231556758" office:target-frame-name="_top" xlink:show="replace"><text:span text:style-name="Hyperlink">Fig 5: Port Scanning my Wi-Fi router</text:span><text:tab/>1</text:a></text:p>
          <text:p text:style-name="P38"><text:a xlink:href="#_Toc231556759" office:target-frame-name="_top" xlink:show="replace"><text:span text:style-name="Hyperlink">Student Reflection</text:span><text:tab/>1</text:a></text:p>
          <text:p text:style-name="P39"><text:a xlink:href="#_Toc231556760" office:target-frame-name="_top" xlink:show="replace"><text:span text:style-name="Hyperlink">Week 2: Vulnerability Analysis</text:span><text:tab/>1</text:a></text:p>
          <text:p text:style-name="P40"><text:a xlink:href="#_Toc231556761" office:target-frame-name="_top" xlink:show="replace"><text:span text:style-name="Hyperlink">Tools Used</text:span><text:tab/>1</text:a></text:p>
          <text:p text:style-name="P41"><text:a xlink:href="#_Toc231556762" office:target-frame-name="_top" xlink:show="replace"><text:span text:style-name="Hyperlink">Fig 4: Identifying the domain registrar using whois</text:span><text:tab/>1</text:a></text:p>
          <text:p text:style-name="P42"><text:a xlink:href="#_Toc231556763" office:target-frame-name="_top" xlink:show="replace"><text:span text:style-name="Hyperlink">Fig 5: identifying the ip address using ping</text:span><text:tab/>1</text:a></text:p>
          <text:p text:style-name="P43"><text:a xlink:href="#_Toc231556764" office:target-frame-name="_top" xlink:show="replace"><text:span text:style-name="Hyperlink">Fig 6: <text:s/>Using theHarvester to retrieve email information and subdomains</text:span><text:tab/>1</text:a></text:p>
          <text:p text:style-name="P44"><text:a xlink:href="#_Toc231556765" office:target-frame-name="_top" xlink:show="replace"><text:span text:style-name="Hyperlink">Fig 7: Using Nmap to retrieve open ports and running services</text:span><text:tab/>1</text:a></text:p>
          <text:p text:style-name="P45"><text:a xlink:href="#_Toc231556766" office:target-frame-name="_top" xlink:show="replace"><text:span text:style-name="Hyperlink">Fig 8: Checking OS version using Nmap</text:span><text:tab/>1</text:a></text:p>
          <text:p text:style-name="P46"><text:a xlink:href="#_Toc231556767" office:target-frame-name="_top" xlink:show="replace"><text:span text:style-name="Hyperlink">Student Reflection</text:span><text:tab/>1</text:a></text:p>
        </text:index-body>
      </text:table-of-content>
      <text:p text:style-name="Normal"/>
      <text:h text:style-name="Heading1" text:outline-level="1"/>
      <text:p text:style-name="P47"/>
      <text:h text:style-name="Heading1" text:outline-level="1"><text:bookmark-start text:name="_Toc231556753"/>Week 1:<text:s/>Nmap<text:s/>Installation and Scanning<text:bookmark-end text:name="_Toc231556753"/></text:h>
      <text:h text:style-name="Heading2" text:outline-level="2"><text:bookmark-start text:name="_Toc231556754"/>Fig 1:<text:s/>NMAP INSTALLATION<text:bookmark-end text:name="_Toc231556754"/></text:h>
      <text:p text:style-name="Normal"><draw:frame draw:style-name="a1" draw:name="Picture 4" text:anchor-type="as-char" svg:x="0in" svg:y="0in" svg:width="5.17708in" svg:height="4.05208in" style:rel-width="scale" style:rel-height="scale"><draw:image xlink:href="media/image2.png" xlink:type="simple" xlink:show="embed" xlink:actuate="onLoad"/><svg:title/><svg:desc/></draw:frame></text:p>
      <text:h text:style-name="Heading2" text:outline-level="2"><text:bookmark-start text:name="_Toc231556755"/>Fig 2:<text:s/>CONFIRMING INSTALLATION<text:bookmark-end text:name="_Toc231556755"/><text:s/></text:h>
      <text:p text:style-name="Normal"><draw:frame draw:style-name="a2" draw:name="Picture 2" text:anchor-type="as-char" svg:x="0in" svg:y="0in" svg:width="6.5in" svg:height="3.42361in" style:rel-width="scale" style:rel-height="scale"><draw:image xlink:href="media/image3.png" xlink:type="simple" xlink:show="embed" xlink:actuate="onLoad"/><svg:title/><svg:desc/></draw:frame></text:p>
      <text:h text:style-name="Heading2" text:outline-level="2"><text:bookmark-start text:name="_Toc231556756"/>Fig 3:<text:s/>Scanning scanme.nmap.org<text:bookmark-end text:name="_Toc231556756"/><text:s/></text:h>
      <text:p text:style-name="Normal"><draw:frame draw:style-name="a3" draw:name="Picture 3" text:anchor-type="as-char" svg:x="0in" svg:y="0in" svg:width="6.5in" svg:height="4.78542in" style:rel-width="scale" style:rel-height="scale"><draw:image xlink:href="media/image4.png" xlink:type="simple" xlink:show="embed" xlink:actuate="onLoad"/><svg:title/><svg:desc/></draw:frame></text:p>
      <text:h text:style-name="Heading2" text:outline-level="2"><text:bookmark-start text:name="_Toc231556757"/>Fig 4: Scanning an ip address<text:bookmark-end text:name="_Toc231556757"/></text:h>
      <text:p text:style-name="Normal"/>
      <text:p text:style-name="Normal"><draw:frame draw:style-name="a4" draw:name="drawing" text:anchor-type="as-char" svg:x="0in" svg:y="0in" svg:width="6.5in" svg:height="3.46875in" style:rel-width="scale" style:rel-height="scale"><draw:image xlink:href="media/image5.png" xlink:type="simple" xlink:show="embed" xlink:actuate="onLoad"/><svg:title/><svg:desc/></draw:frame></text:p>
      <text:h text:style-name="Heading2" text:outline-level="2"><text:bookmark-start text:name="_Toc231556758"/>Fig 5: Port Scanning my<text:s/>Wi-Fi<text:s/>router<text:bookmark-end text:name="_Toc231556758"/></text:h>
      <text:p text:style-name="Normal"><draw:frame draw:style-name="a5" draw:name="drawing" text:anchor-type="as-char" svg:x="0in" svg:y="0in" svg:width="6.5in" svg:height="1.78125in" style:rel-width="scale" style:rel-height="scale"><draw:image xlink:href="media/image6.png" xlink:type="simple" xlink:show="embed" xlink:actuate="onLoad"/><svg:title/><svg:desc/></draw:frame></text:p>
      <text:h text:style-name="Heading2" text:outline-level="2"/>
      <text:h text:style-name="Heading2" text:outline-level="2"><text:bookmark-start text:name="_Toc231556759"/>Student<text:s/>Reflection<text:bookmark-end text:name="_Toc231556759"/></text:h>
      <text:p text:style-name="Normal">I downloaded and installed Nmap. I tried<text:s/>checking on the ports and services of my<text:s/>friend’s<text:s/>laptop<text:s/>but it’s firewalls were too strong and the<text:s/>Process<text:s/>returned a blank page. I then used my wifi router<text:s/>as the target<text:s/>and I was able to get some results.<text:s/>Footprinting did not work on the router it returned an empty page.<text:s/></text:p>
      <text:h text:style-name="P48" text:outline-level="2"/>
      <text:h text:style-name="Heading1" text:outline-level="1"><text:bookmark-start text:name="_Toc231556760"/>Week 2:<text:s/>Vulnerability Analysis<text:bookmark-end text:name="_Toc231556760"/></text:h>
      <text:p text:style-name="Normal">Organization<text:s/>Identified:<text:s/><text:s/>KPLC (kplc.co.ke)</text:p>
      <text:h text:style-name="Heading2" text:outline-level="2"><text:bookmark-start text:name="_Toc231556761"/>Tools Used<text:bookmark-end text:name="_Toc231556761"/></text:h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Tool</text:p>
          </table:table-cell>
          <table:table-cell table:style-name="TableCell56">
            <text:p text:style-name="P57">Objective</text:p>
          </table:table-cell>
          <table:table-cell table:style-name="TableCell58">
            <text:p text:style-name="P59">Findings</text:p>
          </table:table-cell>
        </table:table-row>
        <table:table-row table:style-name="TableRow60">
          <table:table-cell table:style-name="TableCell61">
            <text:p text:style-name="P62">whois</text:p>
          </table:table-cell>
          <table:table-cell table:style-name="TableCell63">
            <text:p text:style-name="P64">Registrar</text:p>
          </table:table-cell>
          <table:table-cell table:style-name="TableCell65">
            <text:p text:style-name="P66">Safaricom Limited</text:p>
          </table:table-cell>
        </table:table-row>
        <table:table-row table:style-name="TableRow67">
          <table:table-cell table:style-name="TableCell68">
            <text:p text:style-name="P69">whois</text:p>
          </table:table-cell>
          <table:table-cell table:style-name="TableCell70">
            <text:p text:style-name="P71">Registrar Email</text:p>
          </table:table-cell>
          <table:table-cell table:style-name="TableCell72">
            <text:p text:style-name="P73">ebt-domain@safaricom.co.ke</text:p>
          </table:table-cell>
        </table:table-row>
        <table:table-row table:style-name="TableRow74">
          <table:table-cell table:style-name="TableCell75">
            <text:p text:style-name="P76">ping</text:p>
          </table:table-cell>
          <table:table-cell table:style-name="TableCell77">
            <text:p text:style-name="P78">Domain IP</text:p>
          </table:table-cell>
          <table:table-cell table:style-name="TableCell79">
            <text:p text:style-name="P80">41.80.37.27</text:p>
          </table:table-cell>
        </table:table-row>
        <table:table-row table:style-name="TableRow81">
          <table:table-cell table:style-name="TableCell82">
            <text:p text:style-name="P83">theHarvester</text:p>
          </table:table-cell>
          <table:table-cell table:style-name="TableCell84">
            <text:p text:style-name="P85">Email Patterns</text:p>
          </table:table-cell>
          <table:table-cell table:style-name="TableCell86">
            <text:p text:style-name="P87">e.g.: cjagongo@kplc.co.ke</text:p>
          </table:table-cell>
        </table:table-row>
        <table:table-row table:style-name="TableRow88">
          <table:table-cell table:style-name="TableCell89">
            <text:p text:style-name="P90">theHarvester</text:p>
          </table:table-cell>
          <table:table-cell table:style-name="TableCell91">
            <text:p text:style-name="P92">Subdomains<text:s/>and their ports</text:p>
          </table:table-cell>
          <table:table-cell table:style-name="TableCell93">
            <text:p text:style-name="P94">e.g.:<text:s/>analytics.kplc.co.ke -<text:s/><text:span text:style-name="T95">41.203.223.132</text:span></text:p>
          </table:table-cell>
        </table:table-row>
        <table:table-row table:style-name="TableRow96">
          <table:table-cell table:style-name="TableCell97">
            <text:p text:style-name="P98">Nmap</text:p>
          </table:table-cell>
          <table:table-cell table:style-name="TableCell99">
            <text:p text:style-name="P100">Open Ports<text:s/>and Services</text:p>
          </table:table-cell>
          <table:table-cell table:style-name="TableCell101">
            <text:p text:style-name="P102">Port:<text:s/>25/tcp <text:s text:c="3"/></text:p>
            <text:p text:style-name="P103">Service:<text:s/>smtp</text:p>
          </table:table-cell>
        </table:table-row>
        <table:table-row table:style-name="TableRow104">
          <table:table-cell table:style-name="TableCell105">
            <text:p text:style-name="P106">Nmap</text:p>
          </table:table-cell>
          <table:table-cell table:style-name="TableCell107">
            <text:p text:style-name="P108">OS version</text:p>
          </table:table-cell>
          <table:table-cell table:style-name="TableCell109">
            <text:p text:style-name="P110">Failed</text:p>
          </table:table-cell>
        </table:table-row>
      </table:table>
      <text:p text:style-name="Normal"/>
      <text:h text:style-name="Heading2" text:outline-level="2"><text:bookmark-start text:name="_Toc231556762"/>Fig<text:s/>4: Identifying the domain registrar using whois<text:bookmark-end text:name="_Toc231556762"/></text:h>
      <text:p text:style-name="Normal"><draw:frame draw:style-name="a6" draw:name="drawing" text:anchor-type="as-char" svg:x="0in" svg:y="0in" svg:width="6.88542in" svg:height="3.68546in" style:rel-width="scale" style:rel-height="scale"><draw:image xlink:href="media/image7.png" xlink:type="simple" xlink:show="embed" xlink:actuate="onLoad"/><svg:title/><svg:desc/></draw:frame></text:p>
      <text:h text:style-name="Heading2" text:outline-level="2"><text:bookmark-start text:name="_Toc231556763"/>Fig<text:s/>5: identifying the ip address using ping<text:bookmark-end text:name="_Toc231556763"/></text:h>
      <text:p text:style-name="Normal"><draw:frame draw:style-name="a7" draw:name="drawing" text:anchor-type="as-char" svg:x="0in" svg:y="0in" svg:width="6.5in" svg:height="3.47917in" style:rel-width="scale" style:rel-height="scale"><draw:image xlink:href="media/image8.png" xlink:type="simple" xlink:show="embed" xlink:actuate="onLoad"/><svg:title/><svg:desc/></draw:frame></text:p>
      <text:h text:style-name="Heading2" text:outline-level="2"><text:bookmark-start text:name="_Toc231556764"/>Fig<text:s/>6: <text:s/>Using theHarvester to retrieve email information and subdomains<text:bookmark-end text:name="_Toc231556764"/></text:h>
      <text:p text:style-name="Normal"><draw:frame draw:style-name="a8" draw:name="drawing" text:anchor-type="as-char" svg:x="0in" svg:y="0in" svg:width="6.47917in" svg:height="5.434in" style:rel-width="scale" style:rel-height="scale"><draw:image xlink:href="media/image9.png" xlink:type="simple" xlink:show="embed" xlink:actuate="onLoad"/><svg:title/><svg:desc/></draw:frame></text:p>
      <text:h text:style-name="Heading2" text:outline-level="2"><text:bookmark-start text:name="_Toc231556765"/>Fig<text:s/>7:<text:s/>Using Nmap to retrieve open ports and running services<text:bookmark-end text:name="_Toc231556765"/></text:h>
      <text:p text:style-name="Normal"><draw:frame draw:style-name="a9" draw:name="drawing" text:anchor-type="as-char" svg:x="0in" svg:y="0in" svg:width="6.5in" svg:height="3.39583in" style:rel-width="scale" style:rel-height="scale"><draw:image xlink:href="media/image10.png" xlink:type="simple" xlink:show="embed" xlink:actuate="onLoad"/><svg:title/><svg:desc/></draw:frame></text:p>
      <text:p text:style-name="Normal"/>
      <text:h text:style-name="Heading2" text:outline-level="2"><text:bookmark-start text:name="_Toc231556766"/>Fig<text:s/>8:<text:s/>Checking OS version using Nmap<text:bookmark-end text:name="_Toc231556766"/></text:h>
      <text:p text:style-name="Normal"><text:span text:style-name="T111">Nmap scan report for cpanelkplc.safaricombusiness.co.ke (41.80.37.27)<text:s/></text:span><text:line-break/><text:span text:style-name="T112">Host is up.</text:span></text:p>
      <text:p text:style-name="Normal"><text:span text:style-name="T113">All 1000 scanned ports on cpanelkplc.safaricombusiness.co.ke (41.80.37.27) are in ignored states.<text:s/></text:span><text:line-break/><text:span text:style-name="T114">Not shown: 1000 filtered tcp ports (no-response)<text:s/></text:span><text:line-break/><text:span text:style-name="T115">Too many fingerprints match this host to give specific OS details</text:span><text:line-break/></text:p>
      <text:p text:style-name="Normal"><draw:frame draw:style-name="a10" draw:name="drawing" text:anchor-type="as-char" svg:x="0in" svg:y="0in" svg:width="6.5in" svg:height="3.6875in" style:rel-width="scale" style:rel-height="scale"><draw:image xlink:href="media/image11.png" xlink:type="simple" xlink:show="embed" xlink:actuate="onLoad"/><svg:title/><svg:desc/></draw:frame><draw:frame draw:style-name="a11" draw:name="drawing" text:anchor-type="as-char" svg:x="0in" svg:y="0in" svg:width="6.5in" svg:height="4.46875in" style:rel-width="scale" style:rel-height="scale"><draw:image xlink:href="media/image12.png" xlink:type="simple" xlink:show="embed" xlink:actuate="onLoad"/><svg:title/><svg:desc/></draw:frame></text:p>
      <text:p text:style-name="Normal"/>
      <text:h text:style-name="Heading2" text:outline-level="2"><text:bookmark-start text:name="_Toc231556767"/>Student Reflection<text:bookmark-end text:name="_Toc231556767"/><text:s/></text:h>
      <text:p text:style-name="Normal">The target domain<text:s/>was<text:s/><text:span text:style-name="T116">kplc.co.ke</text:span>. Using whois and ping, I identified the domain registrar <text:s/>and resolved the primary IP address.<text:s/>theHarvester successfully mapped out sensitive internal details, revealing internal email patterns and harvesting 125 subdomains.</text:p>
      <text:p text:style-name="Normal">Active scanning via Nmap<text:s/>exposed<text:s/>multiple open ports handling mail and web traffic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onospace" svg:font-family="monospace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TOC1" style:display-name="TOC 1" style:family="paragraph" style:parent-style-name="Normal" style:next-style-name="Normal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NAN KIPLIMO - BSCCS202567071</meta:initial-creator>
    <dc:creator>KENAN KIPLIMO - BSCCS202567071</dc:creator>
    <meta:creation-date>2026-06-11T10:54:00Z</meta:creation-date>
    <dc:date>2026-06-11T10:54:00Z</dc:date>
    <meta:template xlink:href="Normal.dotm" xlink:type="simple"/>
    <meta:editing-cycles>56</meta:editing-cycles>
    <meta:editing-duration>PT0S</meta:editing-duration>
    <meta:document-statistic meta:page-count="1" meta:paragraph-count="7" meta:word-count="564" meta:character-count="3777" meta:row-count="26" meta:non-whitespace-character-count="3220"/>
  </office:meta>
</office:document-meta>
</file>